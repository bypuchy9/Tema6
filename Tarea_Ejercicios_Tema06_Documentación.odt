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Verdana" style:font-family-asian="Verdana" style:font-family-complex="Verdana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1.00pt" fo:font-weight="normal" fo:font-family="'MesloLGS NF'" style:font-family-asian="'MesloLGS NF'" style:font-family-complex="'MesloLGS NF'" fo:background-color="#ffffff" fo:color="#8c8c8c" fo:font-style="italic"/>
    </style:style>
    <style:style style:name="T11" style:family="text">
      <style:text-properties fo:font-size="11.00pt" fo:font-weight="normal" fo:font-family="'MesloLGS NF'" style:font-family-asian="'MesloLGS NF'" style:font-family-complex="'MesloLGS NF'" fo:background-color="#ffffff" style:use-window-font-color="true" fo:font-style="italic"/>
    </style:style>
    <style:style style:name="T12" style:family="text">
      <style:text-properties fo:font-size="11.00pt" fo:font-weight="normal" fo:font-family="'MesloLGS NF'" style:font-family-asian="'MesloLGS NF'" style:font-family-complex="'MesloLGS NF'" fo:background-color="#ffffff" fo:color="#8c8c8c" fo:font-style="italic"/>
    </style:style>
    <style:style style:name="T13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14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15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18" style:family="text">
      <style:text-properties fo:font-size="11.00pt" fo:font-weight="normal" fo:font-family="'MesloLGS NF'" style:font-family-asian="'MesloLGS NF'" style:font-family-complex="'MesloLGS NF'" fo:background-color="#ffffff" fo:color="#8c8c8c" fo:font-style="italic"/>
    </style:style>
    <style:style style:name="T19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20" style:family="text">
      <style:text-properties fo:font-size="11.00pt" fo:font-weight="normal" fo:font-family="'MesloLGS NF'" style:font-family-asian="'MesloLGS NF'" style:font-family-complex="'MesloLGS NF'" fo:background-color="#ffffff" fo:color="#00627a"/>
    </style:style>
    <style:style style:name="T21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22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23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24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25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26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27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28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29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30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31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32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33" style:family="text">
      <style:text-properties fo:font-size="11.00pt" fo:font-weight="normal" fo:font-family="'MesloLGS NF'" style:font-family-asian="'MesloLGS NF'" style:font-family-complex="'MesloLGS NF'" fo:background-color="#ffffff" fo:color="#8c8c8c" fo:font-style="italic"/>
    </style:style>
    <style:style style:name="T34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35" style:family="text">
      <style:text-properties fo:font-size="11.00pt" fo:font-weight="normal" fo:font-family="'MesloLGS NF'" style:font-family-asian="'MesloLGS NF'" style:font-family-complex="'MesloLGS NF'" fo:background-color="#ffffff" fo:color="#00627a"/>
    </style:style>
    <style:style style:name="T36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37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38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39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40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41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42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43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44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45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46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47" style:family="text">
      <style:text-properties fo:font-size="11.00pt" fo:font-weight="normal" fo:font-family="'MesloLGS NF'" style:font-family-asian="'MesloLGS NF'" style:font-family-complex="'MesloLGS NF'" fo:background-color="#ffffff" fo:color="#1750eb"/>
    </style:style>
    <style:style style:name="T48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49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50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51" style:family="text">
      <style:text-properties fo:font-size="11.00pt" fo:font-weight="normal" fo:font-family="'MesloLGS NF'" style:font-family-asian="'MesloLGS NF'" style:font-family-complex="'MesloLGS NF'" fo:background-color="#ffffff" fo:color="#067d17"/>
    </style:style>
    <style:style style:name="T52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53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54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55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56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57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58" style:family="text">
      <style:text-properties fo:font-size="14.50pt" fo:font-weight="normal" fo:font-family="'MesloLGS NF'" style:font-family-asian="'MesloLGS NF'" style:font-family-complex="'MesloLGS NF'" fo:background-color="#ffffff" fo:color="#080808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6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'Times New Roman'" style:font-family-asian="'Times New Roman'" style:font-family-complex="'Times New Roman'" fo:background-color="#ffffff" fo:color="#080808"/>
    </style:style>
    <style:style style:name="T64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65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66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67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68" style:family="text">
      <style:text-properties fo:font-size="11.00pt" fo:font-weight="normal" fo:font-family="'MesloLGS NF'" style:font-family-asian="'MesloLGS NF'" style:font-family-complex="'MesloLGS NF'" fo:background-color="#ffffff" fo:color="#871094"/>
    </style:style>
    <style:style style:name="T69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70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71" style:family="text">
      <style:text-properties fo:font-size="11.00pt" fo:font-weight="normal" fo:font-family="'MesloLGS NF'" style:font-family-asian="'MesloLGS NF'" style:font-family-complex="'MesloLGS NF'" fo:background-color="#ffffff" fo:color="#00627a"/>
    </style:style>
    <style:style style:name="T72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73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74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75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76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77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78" style:family="text">
      <style:text-properties fo:font-size="11.00pt" fo:font-weight="normal" fo:font-family="'MesloLGS NF'" style:font-family-asian="'MesloLGS NF'" style:font-family-complex="'MesloLGS NF'" fo:background-color="#ffffff" fo:color="#871094"/>
    </style:style>
    <style:style style:name="T79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80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81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82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83" style:family="text">
      <style:text-properties fo:font-size="11.00pt" fo:font-weight="normal" fo:font-family="'MesloLGS NF'" style:font-family-asian="'MesloLGS NF'" style:font-family-complex="'MesloLGS NF'" fo:background-color="#ffffff" fo:color="#00627a"/>
    </style:style>
    <style:style style:name="T84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85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86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87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88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89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90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91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92" style:family="text">
      <style:text-properties fo:font-size="11.00pt" fo:font-weight="normal" fo:font-family="'MesloLGS NF'" style:font-family-asian="'MesloLGS NF'" style:font-family-complex="'MesloLGS NF'" fo:background-color="#ffffff" fo:color="#1750eb"/>
    </style:style>
    <style:style style:name="T93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94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95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96" style:family="text">
      <style:text-properties fo:font-size="11.00pt" fo:font-weight="normal" fo:font-family="'MesloLGS NF'" style:font-family-asian="'MesloLGS NF'" style:font-family-complex="'MesloLGS NF'" fo:background-color="#ffffff" fo:color="#067d17"/>
    </style:style>
    <style:style style:name="T97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98" style:family="text">
      <style:text-properties fo:font-size="11.00pt" fo:font-weight="normal" fo:font-family="'MesloLGS NF'" style:font-family-asian="'MesloLGS NF'" style:font-family-complex="'MesloLGS NF'" fo:background-color="#ffffff" fo:color="#871094"/>
    </style:style>
    <style:style style:name="T99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100" style:family="text">
      <style:text-properties fo:font-size="11.00pt" fo:font-weight="normal" fo:font-family="'MesloLGS NF'" style:font-family-asian="'MesloLGS NF'" style:font-family-complex="'MesloLGS NF'" fo:background-color="#ffffff" fo:color="#000000"/>
    </style:style>
    <style:style style:name="T101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102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103" style:family="text">
      <style:text-properties fo:font-size="11.00pt" fo:font-weight="normal" fo:font-family="'MesloLGS NF'" style:font-family-asian="'MesloLGS NF'" style:font-family-complex="'MesloLGS NF'" fo:background-color="#ffffff" fo:color="#00627a"/>
    </style:style>
    <style:style style:name="T104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105" style:family="text">
      <style:text-properties fo:font-size="11.00pt" fo:font-weight="normal" fo:font-family="'MesloLGS NF'" style:font-family-asian="'MesloLGS NF'" style:font-family-complex="'MesloLGS NF'" fo:background-color="#ffffff" fo:color="#871094"/>
    </style:style>
    <style:style style:name="T106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107" style:family="text">
      <style:text-properties fo:font-size="11.00pt" fo:font-weight="normal" fo:font-family="'MesloLGS NF'" style:font-family-asian="'MesloLGS NF'" style:font-family-complex="'MesloLGS NF'" fo:background-color="#ffffff" fo:color="#1750eb"/>
    </style:style>
    <style:style style:name="T108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109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110" style:family="text">
      <style:text-properties fo:font-size="11.00pt" fo:font-weight="normal" fo:font-family="'MesloLGS NF'" style:font-family-asian="'MesloLGS NF'" style:font-family-complex="'MesloLGS NF'" fo:background-color="#ffffff" fo:color="#00627a"/>
    </style:style>
    <style:style style:name="T111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112" style:family="text">
      <style:text-properties fo:font-size="11.00pt" fo:font-weight="normal" fo:font-family="'MesloLGS NF'" style:font-family-asian="'MesloLGS NF'" style:font-family-complex="'MesloLGS NF'" fo:background-color="#ffffff" fo:color="#0033b3"/>
    </style:style>
    <style:style style:name="T113" style:family="text">
      <style:text-properties fo:font-size="11.00pt" fo:font-weight="normal" fo:font-family="'MesloLGS NF'" style:font-family-asian="'MesloLGS NF'" style:font-family-complex="'MesloLGS NF'" fo:background-color="#ffffff" fo:color="#871094"/>
    </style:style>
    <style:style style:name="T114" style:family="text">
      <style:text-properties fo:font-size="11.00pt" fo:font-weight="normal" fo:font-family="'MesloLGS NF'" style:font-family-asian="'MesloLGS NF'" style:font-family-complex="'MesloLGS NF'" fo:background-color="#ffffff" fo:color="#080808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1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8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1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2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3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3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4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5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5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57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5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59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6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61" style:family="text">
      <style:text-properties fo:font-size="10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162" style:family="text">
      <style:text-properties fo:font-size="10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16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64" style:family="text">
      <style:text-properties fo:font-size="10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165" style:family="text">
      <style:text-properties fo:font-size="10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16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67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6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8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84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8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86" style:family="text">
      <style:text-properties fo:font-size="11.00pt" fo:font-weight="bold" fo:font-family="Verdana" style:font-family-asian="Verdana" style:font-family-complex="Verdana" fo:background-color="transparent" style:use-window-font-color="true"/>
    </style:style>
    <style:style style:name="T187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8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8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0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0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0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03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0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05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0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0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1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13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1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15" style:family="text">
      <style:text-properties fo:font-size="10.00pt" fo:font-weight="bold" fo:font-family="Verdana" style:font-family-asian="Verdana" style:font-family-complex="Verdana" fo:background-color="transparent" style:use-window-font-color="true" fo:font-style="italic"/>
    </style:style>
    <style:style style:name="T21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17" style:family="text">
      <style:text-properties fo:font-size="10.00pt" fo:font-weight="bold" fo:font-family="Verdana" style:font-family-asian="Verdana" style:font-family-complex="Verdana" fo:background-color="transparent" style:use-window-font-color="true" fo:font-style="italic"/>
    </style:style>
    <style:style style:name="T21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2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22" style:family="text">
      <style:text-properties fo:font-size="10.00pt" fo:font-weight="bold" fo:font-family="Verdana" style:font-family-asian="Verdana" style:font-family-complex="Verdana" fo:background-color="transparent" style:use-window-font-color="true" fo:font-style="italic"/>
    </style:style>
    <style:style style:name="T22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24" style:family="text">
      <style:text-properties fo:font-size="10.00pt" fo:font-weight="bold" fo:font-family="Verdana" style:font-family-asian="Verdana" style:font-family-complex="Verdana" fo:background-color="transparent" style:use-window-font-color="true" fo:font-style="italic"/>
    </style:style>
    <style:style style:name="T22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26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2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28" style:family="text">
      <style:text-properties fo:font-size="10.00pt" fo:font-weight="normal" fo:font-family="'Cambria Math'" style:font-family-asian="'Cambria Math'" style:font-family-complex="'Cambria Math'" fo:background-color="transparent" style:use-window-font-color="true"/>
    </style:style>
    <style:style style:name="T22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3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31" style:family="text">
      <style:text-properties fo:font-size="10.00pt" fo:font-weight="bold" fo:font-family="Verdana" style:font-family-asian="Verdana" style:font-family-complex="Verdana" fo:background-color="transparent" style:use-window-font-color="true" fo:font-style="italic"/>
    </style:style>
    <style:style style:name="T23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33" style:family="text">
      <style:text-properties fo:font-size="10.00pt" fo:font-weight="bold" fo:font-family="Verdana" style:font-family-asian="Verdana" style:font-family-complex="Verdana" fo:background-color="transparent" style:use-window-font-color="true" fo:font-style="italic"/>
    </style:style>
    <style:style style:name="T23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3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38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3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40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4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4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45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4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47" style:family="text">
      <style:text-properties fo:font-size="11.00pt" fo:font-weight="normal" fo:font-family="'MesloLGS NF'" style:font-family-asian="'MesloLGS NF'" style:font-family-complex="'MesloLGS NF'" fo:background-color="transparent" fo:color="#000000"/>
    </style:style>
    <style:style style:name="T248" style:family="text">
      <style:text-properties fo:font-size="11.00pt" fo:font-weight="normal" fo:font-family="'MesloLGS NF'" style:font-family-asian="'MesloLGS NF'" style:font-family-complex="'MesloLGS NF'" fo:background-color="transparent" fo:color="#080808"/>
    </style:style>
    <style:style style:name="T249" style:family="text">
      <style:text-properties fo:font-size="11.00pt" fo:font-weight="normal" fo:font-family="'MesloLGS NF'" style:font-family-asian="'MesloLGS NF'" style:font-family-complex="'MesloLGS NF'" fo:background-color="transparent" fo:color="#080808" fo:font-style="italic"/>
    </style:style>
    <style:style style:name="T250" style:family="text">
      <style:text-properties fo:font-size="11.00pt" fo:font-weight="normal" fo:font-family="'MesloLGS NF'" style:font-family-asian="'MesloLGS NF'" style:font-family-complex="'MesloLGS NF'" fo:background-color="transparent" fo:color="#080808"/>
    </style:style>
    <style:style style:name="T251" style:family="text">
      <style:text-properties fo:font-size="11.00pt" fo:font-weight="normal" fo:font-family="'MesloLGS NF'" style:font-family-asian="'MesloLGS NF'" style:font-family-complex="'MesloLGS NF'" fo:background-color="transparent" fo:color="#1750eb"/>
    </style:style>
    <style:style style:name="T252" style:family="text">
      <style:text-properties fo:font-size="11.00pt" fo:font-weight="normal" fo:font-family="'MesloLGS NF'" style:font-family-asian="'MesloLGS NF'" style:font-family-complex="'MesloLGS NF'" fo:background-color="transparent" fo:color="#080808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5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5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59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6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6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7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50.00%" fo:text-align="justify"/>
    </style:style>
    <style:style style:name="P2" style:family="paragraph">
      <style:paragraph-properties fo:line-height="150.00%" fo:text-align="justify" fo:margin-bottom="6.00pt"/>
    </style:style>
    <style:style style:name="P3" style:family="paragraph">
      <style:paragraph-properties fo:line-height="150.00%" fo:text-align="justify"/>
    </style:style>
    <style:style style:name="P4" style:family="paragraph">
      <style:paragraph-properties fo:line-height="150.00%" fo:text-align="justify" fo:margin-bottom="6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50.00%" fo:text-align="justify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50.00%" fo:text-align="justify"/>
    </style:style>
    <style:style style:name="P9" style:family="paragraph">
      <style:paragraph-properties fo:line-height="100.00%" fo:text-align="justify" fo:margin-bottom="6.00pt"/>
    </style:style>
    <style:style style:name="P10" style:family="paragraph">
      <style:paragraph-properties fo:line-height="100.00%" fo:text-align="left" fo:margin-bottom="6.00pt"/>
    </style:style>
    <style:style style:name="P11" style:family="paragraph">
      <style:paragraph-properties fo:line-height="150.00%" fo:text-align="justify"/>
    </style:style>
    <style:style style:name="P12" style:family="paragraph">
      <style:paragraph-properties fo:line-height="100.00%" fo:text-align="justify" fo:margin-bottom="6.00pt"/>
    </style:style>
    <style:style style:name="P13" style:family="paragraph">
      <style:paragraph-properties fo:line-height="100.00%" fo:text-align="justify" fo:margin-top="7.00pt" fo:margin-bottom="6.00pt"/>
    </style:style>
    <text:list-style style:name="L1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justify" fo:margin-bottom="6.00pt"/>
    </style:style>
    <style:style style:name="P16" style:family="paragraph">
      <style:paragraph-properties fo:line-height="100.00%" fo:text-align="justify" fo:margin-bottom="6.00pt"/>
    </style:style>
    <text:list-style style:name="L1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justify" fo:margin-left="35.45pt" fo:text-indent="0.00pt"/>
    </style:style>
    <text:list-style style:name="L19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justify" fo:margin-left="35.45pt" fo:text-indent="0.00pt"/>
    </style:style>
    <text:list-style style:name="L2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justify" fo:margin-left="35.45pt" fo:text-indent="0.00pt"/>
    </style:style>
    <text:list-style style:name="L2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justify" fo:margin-left="35.45pt" fo:text-indent="0.00pt"/>
    </style:style>
    <text:list-style style:name="L2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justify" fo:margin-left="35.45pt" fo:text-indent="0.00pt"/>
    </style:style>
    <text:list-style style:name="L2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justify" fo:margin-left="35.45pt" fo:text-indent="0.00pt"/>
    </style:style>
    <text:list-style style:name="L29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9" style:family="paragraph">
      <style:paragraph-properties fo:line-height="100.00%" fo:text-align="justify" fo:margin-bottom="6.00pt"/>
    </style:style>
    <style:style style:name="P30" style:family="paragraph">
      <style:paragraph-properties fo:line-height="100.00%" fo:text-align="justify" fo:margin-bottom="6.00pt"/>
    </style:style>
    <style:style style:name="P31" style:family="paragraph">
      <style:paragraph-properties fo:line-height="150.00%" fo:text-align="justify"/>
    </style:style>
    <style:style style:name="P32" style:family="paragraph">
      <style:paragraph-properties fo:line-height="100.00%" fo:text-align="justify" fo:margin-bottom="6.00pt"/>
    </style:style>
    <text:list-style style:name="L3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justify" fo:margin-left="-18.00pt" fo:text-indent="18.00pt" fo:margin-bottom="6.00pt"/>
    </style:style>
    <style:style style:name="P34" style:family="paragraph">
      <style:paragraph-properties fo:line-height="100.00%" fo:text-align="justify" fo:margin-top="7.00pt" fo:margin-bottom="6.00pt"/>
    </style:style>
    <style:style style:name="P35" style:family="paragraph">
      <style:paragraph-properties fo:line-height="100.00%" fo:text-align="justify" fo:margin-bottom="6.00pt"/>
    </style:style>
    <text:list-style style:name="L3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justify" fo:margin-left="-18.00pt" fo:text-indent="18.00pt" fo:margin-bottom="6.00pt"/>
    </style:style>
    <style:style style:name="P37" style:family="paragraph">
      <style:paragraph-properties fo:line-height="100.00%" fo:text-align="justify" fo:margin-top="7.00pt" fo:margin-bottom="6.00pt"/>
    </style:style>
    <style:style style:name="P38" style:family="paragraph">
      <style:paragraph-properties fo:line-height="100.00%" fo:text-align="justify" fo:margin-bottom="6.00pt"/>
    </style:style>
    <text:list-style style:name="L3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justify" fo:margin-left="-18.00pt" fo:text-indent="18.00pt" fo:margin-bottom="6.00pt"/>
    </style:style>
    <style:style style:name="P40" style:family="paragraph">
      <style:paragraph-properties fo:line-height="100.00%" fo:text-align="justify" fo:margin-bottom="6.00pt"/>
    </style:style>
    <text:list-style style:name="L4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1" style:family="paragraph">
      <style:paragraph-properties fo:line-height="100.00%" fo:text-align="justify"/>
    </style:style>
    <style:style style:name="P42" style:family="paragraph">
      <style:paragraph-properties fo:line-height="100.00%" fo:text-align="justify" fo:margin-bottom="6.00pt"/>
    </style:style>
    <style:style style:name="P43" style:family="paragraph">
      <style:paragraph-properties fo:line-height="100.00%" fo:text-align="justify" fo:margin-bottom="6.00pt"/>
    </style:style>
    <text:list-style style:name="L4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4" style:family="paragraph">
      <style:paragraph-properties fo:line-height="100.00%" fo:text-align="justify" fo:margin-left="-18.00pt" fo:text-indent="18.00pt" fo:margin-bottom="6.00pt"/>
    </style:style>
    <style:style style:name="P45" style:family="paragraph">
      <style:paragraph-properties fo:line-height="100.00%" fo:text-align="justify" fo:margin-bottom="6.00pt"/>
    </style:style>
    <text:list-style style:name="L4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justify" fo:margin-left="-18.00pt" fo:text-indent="18.00pt" fo:margin-bottom="6.00pt"/>
    </style:style>
    <style:style style:name="P47" style:family="paragraph">
      <style:paragraph-properties fo:line-height="100.00%" fo:text-align="justify" fo:margin-bottom="6.00pt"/>
    </style:style>
    <text:list-style style:name="L4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8" style:family="paragraph">
      <style:paragraph-properties fo:line-height="100.00%" fo:text-align="justify" fo:margin-left="-18.00pt" fo:text-indent="18.00pt" fo:margin-bottom="6.00pt"/>
    </style:style>
    <style:style style:name="P49" style:family="paragraph">
      <style:paragraph-properties fo:line-height="100.00%" fo:text-align="justify" fo:margin-bottom="6.00pt"/>
    </style:style>
    <text:list-style style:name="L5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0" style:family="paragraph">
      <style:paragraph-properties fo:line-height="100.00%" fo:text-align="justify" fo:margin-left="-18.00pt" fo:text-indent="18.00pt" fo:margin-bottom="6.00pt"/>
    </style:style>
    <style:style style:name="P51" style:family="paragraph">
      <style:paragraph-properties fo:line-height="100.00%" fo:text-align="justify" fo:margin-bottom="6.00pt"/>
    </style:style>
    <text:list-style style:name="L5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2" style:family="paragraph">
      <style:paragraph-properties fo:line-height="100.00%" fo:text-align="justify" fo:margin-left="-18.00pt" fo:text-indent="18.00pt" fo:margin-bottom="6.00pt"/>
    </style:style>
    <style:style style:name="P53" style:family="paragraph">
      <style:paragraph-properties fo:line-height="100.00%" fo:text-align="justify" fo:margin-bottom="6.00pt"/>
    </style:style>
    <text:list-style style:name="L5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4" style:family="paragraph">
      <style:paragraph-properties fo:line-height="100.00%" fo:text-align="justify" fo:margin-left="-18.00pt" fo:text-indent="18.00pt" fo:margin-bottom="6.00pt"/>
    </style:style>
    <style:style style:name="P55" style:family="paragraph">
      <style:paragraph-properties fo:line-height="100.00%" fo:text-align="justify" fo:margin-bottom="6.00pt"/>
    </style:style>
    <text:list-style style:name="L5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6" style:family="paragraph">
      <style:paragraph-properties fo:line-height="100.00%" fo:text-align="justify" fo:margin-left="-18.00pt" fo:text-indent="18.00pt" fo:margin-bottom="6.00pt"/>
    </style:style>
    <style:style style:name="P57" style:family="paragraph">
      <style:paragraph-properties fo:line-height="100.00%" fo:text-align="justify" fo:margin-bottom="6.00pt"/>
    </style:style>
    <text:list-style style:name="L5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8" style:family="paragraph">
      <style:paragraph-properties fo:line-height="100.00%" fo:text-align="justify" fo:margin-left="-18.00pt" fo:text-indent="18.00pt" fo:margin-bottom="6.00pt"/>
    </style:style>
    <style:style style:name="P59" style:family="paragraph">
      <style:paragraph-properties fo:line-height="100.00%" fo:text-align="justify" fo:margin-bottom="6.00pt"/>
    </style:style>
    <text:list-style style:name="L6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0" style:family="paragraph">
      <style:paragraph-properties fo:line-height="100.00%" fo:text-align="justify" fo:margin-left="-18.00pt" fo:text-indent="18.00pt" fo:margin-bottom="6.00pt"/>
    </style:style>
    <style:style style:name="P61" style:family="paragraph">
      <style:paragraph-properties fo:line-height="100.00%" fo:text-align="justify"/>
    </style:style>
    <style:style style:name="P62" style:family="paragraph">
      <style:paragraph-properties fo:line-height="100.00%" fo:text-align="justify" fo:margin-bottom="6.00pt"/>
    </style:style>
    <text:list-style style:name="L6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3" style:family="paragraph">
      <style:paragraph-properties fo:line-height="100.00%" fo:text-align="justify" fo:margin-left="-18.00pt" fo:text-indent="18.00pt" fo:margin-bottom="6.00pt"/>
    </style:style>
    <style:style style:name="P64" style:family="paragraph">
      <style:paragraph-properties fo:line-height="100.00%" fo:text-align="justify" fo:margin-bottom="6.00pt"/>
    </style:style>
    <text:list-style style:name="L6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5" style:family="paragraph">
      <style:paragraph-properties fo:line-height="100.00%" fo:text-align="justify" fo:margin-left="-18.00pt" fo:text-indent="18.00pt" fo:margin-bottom="6.00pt"/>
    </style:style>
    <style:style style:name="P66" style:family="paragraph">
      <style:paragraph-properties fo:line-height="100.00%" fo:text-align="justify" fo:margin-bottom="6.00pt"/>
    </style:style>
    <style:style style:name="P67" style:family="paragraph">
      <style:paragraph-properties fo:line-height="150.00%" fo:text-align="justify"/>
    </style:style>
    <style:style style:name="P68" style:family="paragraph">
      <style:paragraph-properties fo:line-height="100.00%" fo:text-align="justify" fo:margin-bottom="6.00pt"/>
    </style:style>
    <text:list-style style:name="L6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9" style:family="paragraph">
      <style:paragraph-properties fo:line-height="100.00%" fo:text-align="justify" fo:margin-left="-18.00pt" fo:text-indent="18.00pt" fo:margin-bottom="6.00pt"/>
    </style:style>
    <style:style style:name="P70" style:family="paragraph">
      <style:paragraph-properties fo:line-height="100.00%" fo:text-align="justify" fo:margin-bottom="6.00pt"/>
    </style:style>
    <style:style style:name="P71" style:family="paragraph">
      <style:paragraph-properties fo:line-height="100.00%" fo:text-align="justify" fo:margin-bottom="6.00pt"/>
    </style:style>
    <text:list-style style:name="L7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2" style:family="paragraph">
      <style:paragraph-properties fo:line-height="100.00%" fo:text-align="justify" fo:margin-left="-18.00pt" fo:text-indent="18.00pt" fo:margin-bottom="6.00pt"/>
    </style:style>
    <style:style style:name="P73" style:family="paragraph">
      <style:paragraph-properties fo:line-height="100.00%" fo:text-align="justify" fo:margin-bottom="6.00pt"/>
    </style:style>
    <style:style style:name="P74" style:family="paragraph">
      <style:paragraph-properties fo:line-height="100.00%" fo:text-align="justify" fo:margin-bottom="6.00pt"/>
    </style:style>
    <style:style style:name="P75" style:family="paragraph">
      <style:paragraph-properties fo:line-height="100.00%" fo:text-align="justify" fo:margin-bottom="6.00pt"/>
    </style:style>
  </office:automatic-styles>
  <office:body>
    <office:text>
      <text:p text:style-name="P1"><text:span text:style-name="T1">Ejercicios Tema 6. Documentación</text:span></text:p>
      <text:p text:style-name="P1"><text:span text:style-name="T2"/></text:p>
      <text:p text:style-name="P1"><text:span text:style-name="T3">Objetivos</text:span></text:p>
      <text:p text:style-name="P2"><text:span text:style-name="T4">Aplicar los conceptos de documentación del software mediante actividades de análisis, corrección, generación de JavaDoc y evaluación crítica de documentación realizada manualmente y con ayuda de IA.</text:span></text:p>
      <text:p text:style-name="P2"><text:span text:style-name="T5"/></text:p>
      <text:p text:style-name="P3"><text:span text:style-name="T6">Ejercicio 1. Detección de errores en JavaDoc</text:span></text:p>
      <text:p text:style-name="P4"><text:span text:style-name="T7">Lee el siguiente código e identifica<text:s/></text:span><text:span text:style-name="T8">al menos 8 errores</text:span><text:span text:style-name="T9"><text:s/>relacionados con la documentación JavaDoc. Después, reescribe correctamente los comentarios.</text:span></text:p>
      <text:p text:style-name="P5"><text:span text:style-name="T10">/**<text:line-break/> * Clase <text:tab/><text:tab/></text:span><text:span text:style-name="T11">Solo dice "Clase",tendria q explicarse mejor</text:span><text:span text:style-name="T12"><text:line-break/> * @author Germán Gascón &lt;ggascon@gmail.com&gt;<text:line-break/> */<text:line-break/></text:span><text:span text:style-name="T13">public class<text:s/></text:span><text:span text:style-name="T14">Calculadora<text:s/></text:span><text:span text:style-name="T15">{</text:span></text:p>
      <text:p text:style-name="P5"><text:span text:style-name="T16"/></text:p>
      <text:p text:style-name="P5"><text:span text:style-name="T17"><text:s text:c="5"/>/**</text:span></text:p>
      <text:p text:style-name="P5"><text:span text:style-name="T17"><text:s text:c="5"/>* Calcula la suma de dos números enteros.</text:span></text:p>
      <text:p text:style-name="P5"><text:span text:style-name="T17"><text:s text:c="5"/>* </text:span></text:p>
      <text:p text:style-name="P5"><text:span text:style-name="T17"><text:s text:c="5"/>* @param a Primer número a sumar.</text:span></text:p>
      <text:p text:style-name="P5"><text:span text:style-name="T17"><text:s text:c="5"/>* @param b Segundo número a sumar.</text:span></text:p>
      <text:p text:style-name="P5"><text:span text:style-name="T17"><text:s text:c="5"/>* @return El resultado de la suma de a y b.</text:span></text:p>
      <text:p text:style-name="P5"><text:span text:style-name="T17"><text:s text:c="5"/>*/</text:span><text:span text:style-name="T18"><text:line-break/><text:s text:c="4"/></text:span><text:span text:style-name="T19">public int<text:s/></text:span><text:span text:style-name="T20">sumar</text:span><text:span text:style-name="T21">(</text:span><text:span text:style-name="T22">int<text:s/></text:span><text:span text:style-name="T23">a</text:span><text:span text:style-name="T24">,<text:s/></text:span><text:span text:style-name="T25">int<text:s/></text:span><text:span text:style-name="T26">b</text:span><text:span text:style-name="T27">) {<text:line-break/><text:s text:c="8"/></text:span><text:span text:style-name="T28">return<text:s/></text:span><text:span text:style-name="T29">a<text:s/></text:span><text:span text:style-name="T30">+<text:s/></text:span><text:span text:style-name="T31">b</text:span><text:span text:style-name="T32">;<text:line-break/><text:s text:c="4"/>}/**</text:span></text:p>
      <text:p text:style-name="P5"><text:span text:style-name="T32"><text:s text:c="5"/>* Realiza la división entera de dos números.</text:span></text:p>
      <text:p text:style-name="P5"><text:span text:style-name="T32"><text:s text:c="5"/>* </text:span></text:p>
      <text:p text:style-name="P5"><text:span text:style-name="T32"><text:s text:c="5"/>* @param a Dividendo de la operación.</text:span></text:p>
      <text:p text:style-name="P5"><text:span text:style-name="T32"><text:s text:c="5"/>* @param b Divisor de la operación.</text:span></text:p>
      <text:p text:style-name="P5"><text:span text:style-name="T32"><text:s text:c="5"/>* @return El cociente de la división entera.</text:span></text:p>
      <text:p text:style-name="P5"><text:span text:style-name="T32"><text:s text:c="5"/>* @throws ArithmeticException Si el divisor (b) es igual a cero.</text:span></text:p>
      <text:p text:style-name="P5"><text:span text:style-name="T32"><text:s text:c="5"/>*/</text:span><text:span text:style-name="T33"><text:line-break/><text:s text:c="4"/></text:span><text:span text:style-name="T34">public int<text:s/></text:span><text:span text:style-name="T35">dividir</text:span><text:span text:style-name="T36">(</text:span><text:span text:style-name="T37">int<text:s/></text:span><text:span text:style-name="T38">a</text:span><text:span text:style-name="T39">,<text:s/></text:span><text:span text:style-name="T40">int<text:s/></text:span><text:span text:style-name="T41">b</text:span><text:span text:style-name="T42">) {<text:line-break/><text:s text:c="8"/></text:span><text:span text:style-name="T43">if<text:s/></text:span><text:span text:style-name="T44">(</text:span><text:span text:style-name="T45">b<text:s/></text:span><text:span text:style-name="T46">==<text:s/></text:span><text:span text:style-name="T47">0</text:span><text:span text:style-name="T48">) {<text:line-break/><text:s text:c="12"/></text:span><text:span text:style-name="T49">throw new<text:s/></text:span><text:span text:style-name="T50">ArithmeticException(</text:span><text:span text:style-name="T51">"División por cero"</text:span><text:span text:style-name="T52">);<text:line-break/><text:s text:c="8"/>}<text:line-break/><text:s text:c="8"/></text:span><text:span text:style-name="T53">return<text:s/></text:span><text:span text:style-name="T54">a<text:s/></text:span><text:span text:style-name="T55">/<text:s/></text:span><text:span text:style-name="T56">b</text:span><text:span text:style-name="T57">;<text:line-break/><text:s text:c="4"/>}<text:line-break/>}</text:span><text:span text:style-name="T58"><text:line-break/></text:span></text:p>
      <text:p text:style-name="P6"><text:span text:style-name="T59"/></text:p>
      <text:p text:style-name="P6"><text:span text:style-name="T59"/></text:p>
      <text:p text:style-name="P6"><text:span text:style-name="T60">Ejercicio 2. Documentación de una clase</text:span></text:p>
      <text:p text:style-name="P6"><text:span text:style-name="T61">Documenta completamente la siguiente clase utilizando JavaDoc.</text:span></text:p>
      <text:p text:style-name="P6"><text:span text:style-name="T62"/></text:p>
      <text:p text:style-name="P7"><text:span text:style-name="T63">//creamos la clase llamada temporizador <text:line-break/></text:span><text:span text:style-name="T64">public class<text:s/></text:span><text:span text:style-name="T65">Temporizador<text:s/></text:span><text:span text:style-name="T66">{<text:line-break/><text:tab/>/**</text:span></text:p>
      <text:p text:style-name="P7"><text:span text:style-name="T66"><text:s text:c="5"/>* Cantidad de segundos almacenados.</text:span></text:p>
      <text:p text:style-name="P7"><text:span text:style-name="T66"><text:s text:c="5"/>*/<text:line-break/><text:s text:c="4"/></text:span><text:span text:style-name="T67">private int<text:s/></text:span><text:span text:style-name="T68">segundos</text:span><text:span text:style-name="T69">;<text:line-break/><text:tab/>/**</text:span></text:p>
      <text:p text:style-name="P7"><text:span text:style-name="T69"><text:s text:c="5"/>* Constructor del temporizador.</text:span></text:p>
      <text:p text:style-name="P7"><text:span text:style-name="T69"><text:s text:c="5"/>*</text:span></text:p>
      <text:p text:style-name="P7"><text:span text:style-name="T69"><text:s text:c="5"/>* @param segundosIniciales Valor inicial en segundos.</text:span></text:p>
      <text:p text:style-name="P7"><text:span text:style-name="T69"><text:s text:c="5"/>*/<text:line-break/><text:s text:c="4"/></text:span><text:span text:style-name="T70">public<text:s/></text:span><text:span text:style-name="T71">Temporizador</text:span><text:span text:style-name="T72">(</text:span><text:span text:style-name="T73">int<text:s/></text:span><text:span text:style-name="T74">segundosIniciales</text:span><text:span text:style-name="T75">) {<text:line-break/><text:s text:c="8"/></text:span><text:span text:style-name="T76">this</text:span><text:span text:style-name="T77">.</text:span><text:span text:style-name="T78">segundos<text:s/></text:span><text:span text:style-name="T79">=<text:s/></text:span><text:span text:style-name="T80">segundosIniciales</text:span><text:span text:style-name="T81">;<text:line-break/><text:s text:c="4"/>}<text:line-break/></text:span></text:p>
      <text:p text:style-name="P7"><text:span text:style-name="T81"><text:tab/>/**</text:span></text:p>
      <text:p text:style-name="P7"><text:span text:style-name="T81"><text:s text:c="5"/>* Incrementa el tiempo del temporizador.</text:span></text:p>
      <text:p text:style-name="P7"><text:span text:style-name="T81"><text:s text:c="5"/>*</text:span></text:p>
      <text:p text:style-name="P7"><text:span text:style-name="T81"><text:s text:c="5"/>* @param segundosExtra Segundos que se añadirán.</text:span></text:p>
      <text:p text:style-name="P7"><text:span text:style-name="T81"><text:s text:c="5"/>* @throws IllegalArgumentException</text:span></text:p>
      <text:p text:style-name="P7"><text:span text:style-name="T81"><text:s text:c="5"/>* si el valor es negativo.</text:span></text:p>
      <text:p text:style-name="P7"><text:span text:style-name="T81"><text:s text:c="5"/>*/<text:s text:c="2"/></text:span></text:p>
      <text:p text:style-name="P7"><text:span text:style-name="T81"><text:s text:c="4"/></text:span><text:span text:style-name="T82">public void<text:s/></text:span><text:span text:style-name="T83">incrementar</text:span><text:span text:style-name="T84">(</text:span><text:span text:style-name="T85">int<text:s/></text:span><text:span text:style-name="T86">segundosExtra</text:span><text:span text:style-name="T87">) {<text:line-break/><text:s text:c="8"/></text:span><text:span text:style-name="T88">if<text:s/></text:span><text:span text:style-name="T89">(</text:span><text:span text:style-name="T90">segundosExtra<text:s/></text:span><text:span text:style-name="T91">&lt;<text:s/></text:span><text:span text:style-name="T92">0</text:span><text:span text:style-name="T93">) {<text:line-break/><text:s text:c="12"/></text:span><text:span text:style-name="T94">throw new<text:s/></text:span><text:span text:style-name="T95">IllegalArgumentException(</text:span><text:span text:style-name="T96">"No se permiten valores negativos"</text:span><text:span text:style-name="T97">);<text:line-break/><text:s text:c="8"/>}<text:line-break/><text:s text:c="8"/></text:span><text:span text:style-name="T98">segundos<text:s/></text:span><text:span text:style-name="T99">+=<text:s/></text:span><text:span text:style-name="T100">segundosExtra</text:span><text:span text:style-name="T101">;<text:line-break/><text:s text:c="4"/>}<text:line-break/> /**</text:span></text:p>
      <text:p text:style-name="P7"><text:span text:style-name="T101"><text:s text:c="5"/>* Reinicia el temporizador a cero.</text:span></text:p>
      <text:p text:style-name="P7"><text:span text:style-name="T101"><text:s text:c="5"/>*/</text:span></text:p>
      <text:p text:style-name="P7"><text:span text:style-name="T101"><text:s text:c="4"/></text:span><text:span text:style-name="T102">public void<text:s/></text:span><text:span text:style-name="T103">reiniciar</text:span><text:span text:style-name="T104">() {<text:line-break/><text:s text:c="8"/></text:span><text:span text:style-name="T105">segundos<text:s/></text:span><text:span text:style-name="T106">=<text:s/></text:span><text:span text:style-name="T107">0</text:span><text:span text:style-name="T108">;<text:line-break/><text:s text:c="4"/>}<text:line-break/><text:tab/> /**</text:span></text:p>
      <text:p text:style-name="P7"><text:span text:style-name="T108"><text:s text:c="5"/>* Devuelve los segundos actuales.</text:span></text:p>
      <text:p text:style-name="P7"><text:span text:style-name="T108"><text:s text:c="5"/>*</text:span></text:p>
      <text:p text:style-name="P7"><text:span text:style-name="T108"><text:s text:c="5"/>* @return Cantidad de segundos.</text:span></text:p>
      <text:p text:style-name="P7"><text:span text:style-name="T108"><text:s text:c="5"/>*/<text:line-break/><text:s text:c="4"/></text:span><text:span text:style-name="T109">public int<text:s/></text:span><text:span text:style-name="T110">getSegundos</text:span><text:span text:style-name="T111">() {<text:line-break/><text:s text:c="8"/></text:span><text:span text:style-name="T112">return<text:s/></text:span><text:span text:style-name="T113">segundos</text:span><text:span text:style-name="T114">;<text:line-break/><text:s text:c="4"/>}<text:line-break/>}<text:line-break/></text:span></text:p>
      <text:p text:style-name="P8"><text:span text:style-name="T115"/></text:p>
      <text:p text:style-name="P8"><text:span text:style-name="T116">Ejercicio 3. Selección de etiquetas adecuadas</text:span></text:p>
      <text:p text:style-name="P9"><text:span text:style-name="T117">Indica qué etiquetas JavaDoc deberían utilizarse para cada uno de los siguientes casos. No es necesario escribir toda la documentación completa; basta con indicar las etiquetas adecuadas y justificar brevemente la respuesta.</text:span></text:p>
      <text:p text:style-name="P9"><text:span text:style-name="T118">a)</text:span><text:span text:style-name="T119"><text:s/>Método que recibe dos parámetros y devuelve un valor.</text:span></text:p>
      <text:p text:style-name="P9"><text:span text:style-name="T120">Etiquetas: @param y @return.</text:span></text:p>
      <text:p text:style-name="P9"><text:span text:style-name="T121"/></text:p>
      <text:p text:style-name="P9"><text:span text:style-name="T122">@param se utiliza para describir cada dato que recibe el método como entrada.</text:span></text:p>
      <text:p text:style-name="P9"><text:span text:style-name="T122">@return sirve para indicar el valor que devuelve el método después de ejecutarse.</text:span></text:p>
      <text:p text:style-name="P9"><text:span text:style-name="T123"/></text:p>
      <text:p text:style-name="P9"><text:span text:style-name="T124">b)</text:span><text:span text:style-name="T125"><text:s/>Método que puede lanzar<text:s/></text:span><text:span text:style-name="T126">IllegalArgumentException</text:span><text:span text:style-name="T127">.</text:span></text:p>
      <text:p text:style-name="P9"><text:span text:style-name="T128">Etiqueta: @throws.</text:span></text:p>
      <text:p text:style-name="P9"><text:span text:style-name="T129"/></text:p>
      <text:p text:style-name="P9"><text:span text:style-name="T130">Esta etiqueta se usa para explicar qué excepción puede producirse durante la ejecución y cuál sería la causa.</text:span></text:p>
      <text:p text:style-name="P9"><text:span text:style-name="T131">c)</text:span><text:span text:style-name="T132"><text:s/>Clase pública de una biblioteca que empezó a existir en la versión 2.0.</text:span></text:p>
      <text:p text:style-name="P9"><text:span text:style-name="T133">Etiqueta: @since.</text:span></text:p>
      <text:p text:style-name="P9"><text:span text:style-name="T134"/></text:p>
      <text:p text:style-name="P9"><text:span text:style-name="T135">Permite indicar desde qué versión del proyecto existe una clase, método o funcionalidad.</text:span></text:p>
      <text:p text:style-name="P9"><text:span text:style-name="T136"/></text:p>
      <text:p text:style-name="P9"><text:span text:style-name="T137">d)</text:span><text:span text:style-name="T138"><text:s/>Método obsoleto que debe sustituirse por otro.</text:span></text:p>
      <text:p text:style-name="P9"><text:span text:style-name="T139">Etiqueta: @deprecated.</text:span></text:p>
      <text:p text:style-name="P9"><text:span text:style-name="T140"/></text:p>
      <text:p text:style-name="P9"><text:span text:style-name="T141">Se utiliza cuando un método ya no es recomendable y existe otra alternativa más actual para reemplazarlo.</text:span></text:p>
      <text:p text:style-name="P9"><text:span text:style-name="T142"/></text:p>
      <text:p text:style-name="P9"><text:span text:style-name="T143">e)</text:span><text:span text:style-name="T144"><text:s/>Método cuya documentación necesita enlazar con otro método relacionado.</text:span></text:p>
      <text:p text:style-name="P9"><text:span text:style-name="T145"/></text:p>
      <text:p text:style-name="P9"><text:span text:style-name="T146">Etiqueta: @see.</text:span></text:p>
      <text:p text:style-name="P9"><text:span text:style-name="T147"/></text:p>
      <text:p text:style-name="P9"><text:span text:style-name="T148">Sirve para añadir referencias a otras clases, métodos o documentación relacionada que pueda ser útil consultar.</text:span></text:p>
      <text:p text:style-name="P9"><text:span text:style-name="T149">f)</text:span><text:span text:style-name="T150"><text:s/>Clase cuyo autor y versión deben mostrarse en la documentación.</text:span></text:p>
      <text:p text:style-name="P9"><text:span text:style-name="T151">Etiquetas: @author y @version.</text:span></text:p>
      <text:p text:style-name="P9"><text:span text:style-name="T152"/></text:p>
      <text:p text:style-name="P9"><text:span text:style-name="T153">@author identifica a la persona que desarrolló la clase y @version indica la versión actual del archivo o componente.</text:span></text:p>
      <text:p text:style-name="P9"><text:span text:style-name="T154"/></text:p>
      <text:p text:style-name="P10"><text:span text:style-name="T154"/></text:p>
      <text:p text:style-name="P10"><text:span text:style-name="T154"/></text:p>
      <text:p text:style-name="P11"><text:span text:style-name="T155">Ejercicio 4. Evaluación de la documentación de un proyecto real</text:span></text:p>
      <text:p text:style-name="P12"><text:span text:style-name="T156">Analiza la documentación del proyecto<text:s/></text:span><text:span text:style-name="T157">jsoup</text:span><text:span text:style-name="T158">, una biblioteca Java muy conocida para trabajar con HTML y XML. El repositorio oficial en GitHub dispone de un README descriptivo, y el proyecto ofrece además una documentación API/Javadoc pública. </text:span></text:p>
      <text:p text:style-name="P13"><text:span text:style-name="T159">Material a consultar</text:span></text:p>
      <text:list text:style-name="L14">
        <text:list-item>
          <text:p text:style-name="P14"><text:span text:style-name="T160">Repositorio:<text:s/></text:span><text:a xlink:href="https://github.com/jhy/jsoup/"><text:span text:style-name="T162">jhy/jsoup</text:span></text:a><text:span text:style-name="T163"><text:s/>en GitHub. </text:span></text:p>
        </text:list-item>
        <text:list-item>
          <text:p text:style-name="P15"><text:span text:style-name="T163">Documentación<text:s/></text:span><text:a xlink:href="https://jsoup.org/apidocs/"><text:span text:style-name="T165">API/Javadoc oficial</text:span></text:a><text:span text:style-name="T166"><text:s/>de jsoup.</text:span></text:p>
        </text:list-item>
      </text:list>
      <text:p text:style-name="P16"><text:span text:style-name="T167">Enunciado</text:span></text:p>
      <text:p text:style-name="P16"><text:span text:style-name="T168">Evalúa la calidad de la documentación del proyecto respondiendo a las siguientes cuestiones:</text:span></text:p>
      <text:list text:style-name="L17">
        <text:list-item>
          <text:p text:style-name="P17"><text:span text:style-name="T168">¿El README explica claramente qué es el proyecto y para qué sirve? </text:span></text:p>
        </text:list-item>
      </text:list>
      <text:p text:style-name="P18"><text:span text:style-name="T169">Sí. Explica desde el inicio que jsoup es una librería Java para trabajar con HTML y XML, indicando sus funciones principales.</text:span></text:p>
      <text:list text:style-name="L19">
        <text:list-item>
          <text:p text:style-name="P19"><text:span text:style-name="T170">¿Incluye instrucciones de uso o ejemplos? </text:span></text:p>
        </text:list-item>
      </text:list>
      <text:p text:style-name="P20"><text:span text:style-name="T171">Sí. Incluye ejemplos básicos de código y explica cómo añadir la dependencia con Maven o Gradle.</text:span></text:p>
      <text:list text:style-name="L21">
        <text:list-item>
          <text:p text:style-name="P21"><text:span text:style-name="T172">¿La documentación API es fácil de navegar? </text:span></text:p>
        </text:list-item>
      </text:list>
      <text:p text:style-name="P22"><text:span text:style-name="T173">Sí. Usa el formato JavaDoc estándar y las clases están bien organizadas.</text:span></text:p>
      <text:list text:style-name="L23">
        <text:list-item>
          <text:p text:style-name="P23"><text:span text:style-name="T174">¿Los nombres de clases y métodos resultan claros?</text:span></text:p>
        </text:list-item>
      </text:list>
      <text:p text:style-name="P24"><text:span text:style-name="T175">Sí. Los nombres son intuitivos y fáciles de entender.</text:span></text:p>
      <text:list text:style-name="L25">
        <text:list-item>
          <text:p text:style-name="P25"><text:span text:style-name="T176">¿La documentación está orientada a desarrolladores? </text:span></text:p>
        </text:list-item>
      </text:list>
      <text:p text:style-name="P26"><text:span text:style-name="T177">Sí. Está enfocada en explicar cómo usar la librería de forma práctica.</text:span></text:p>
      <text:list text:style-name="L27">
        <text:list-item>
          <text:p text:style-name="P27"><text:span text:style-name="T178">¿Qué aspectos mejorarías del README? </text:span></text:p>
        </text:list-item>
      </text:list>
      <text:p text:style-name="P28"><text:span text:style-name="T179">Añadiría una sección de errores frecuentes y más ejemplos rápidos.</text:span></text:p>
      <text:list text:style-name="L29">
        <text:list-item>
          <text:p text:style-name="P29"><text:span text:style-name="T180">¿Qué aspectos mejorarías del JavaDoc o documentación API?</text:span></text:p>
        </text:list-item>
      </text:list>
      <text:p text:style-name="P30"><text:span text:style-name="T181"><text:tab/>Incluiría ejemplos cortos en métodos complejos y una guía de cambios entre versiones.</text:span></text:p>
      <text:p text:style-name="P31"><text:span text:style-name="T182">Ejercicio 5. Crear y documentar una aplicación</text:span></text:p>
      <text:p text:style-name="P32"><text:span text:style-name="T183">Implementa en Java una aplicación que simule partidos de fútbol simplificados por consola.</text:span></text:p>
      <text:p text:style-name="P32"><text:span text:style-name="T183">La aplicación deberá contar con un objeto<text:s/></text:span><text:span text:style-name="T184">Narrador</text:span><text:span text:style-name="T185"><text:s/>encargado de describir cada jugada.</text:span></text:p>
      <text:p text:style-name="P32"><text:span text:style-name="T186"><text:line-break/>Estructura</text:span></text:p>
      <text:p text:style-name="P32"><text:span text:style-name="T187">Jugador</text:span></text:p>
      <text:p text:style-name="P32"><text:span text:style-name="T188">Cada jugador tendrá:</text:span></text:p>
      <text:list text:style-name="L33">
        <text:list-item>
          <text:p text:style-name="P33"><text:span text:style-name="T188">dorsal</text:span></text:p>
        </text:list-item>
        <text:list-item>
          <text:p text:style-name="P33"><text:span text:style-name="T188">nombre y apellidos</text:span></text:p>
        </text:list-item>
        <text:list-item>
          <text:p text:style-name="P33"><text:span text:style-name="T188">portero (0</text:span><text:span text:style-name="T189">–</text:span><text:span text:style-name="T190">100)</text:span></text:p>
        </text:list-item>
        <text:list-item>
          <text:p text:style-name="P33"><text:span text:style-name="T191">defensa (0</text:span><text:span text:style-name="T192">–</text:span><text:span text:style-name="T193">100)</text:span></text:p>
        </text:list-item>
        <text:list-item>
          <text:p text:style-name="P33"><text:span text:style-name="T194">regate (0</text:span><text:span text:style-name="T195">–</text:span><text:span text:style-name="T196">100)</text:span></text:p>
        </text:list-item>
        <text:list-item>
          <text:p text:style-name="P33"><text:span text:style-name="T197">pase (0</text:span><text:span text:style-name="T198">–</text:span><text:span text:style-name="T199">100)</text:span></text:p>
        </text:list-item>
        <text:list-item>
          <text:p text:style-name="P33"><text:span text:style-name="T200">tiro (0</text:span><text:span text:style-name="T201">–</text:span><text:span text:style-name="T202">100)</text:span></text:p>
        </text:list-item>
      </text:list>
      <text:p text:style-name="P34"><text:span text:style-name="T203">Equipo</text:span></text:p>
      <text:p text:style-name="P35"><text:span text:style-name="T204">Cada equipo tendrá:</text:span></text:p>
      <text:list text:style-name="L36">
        <text:list-item>
          <text:p text:style-name="P36"><text:span text:style-name="T204">nombre</text:span></text:p>
        </text:list-item>
        <text:list-item>
          <text:p text:style-name="P36"><text:span text:style-name="T204">array de 11 jugadores</text:span></text:p>
        </text:list-item>
        <text:list-item>
          <text:p text:style-name="P36"><text:span text:style-name="T204">cantidad de goles marcados en el partido</text:span></text:p>
        </text:list-item>
      </text:list>
      <text:p text:style-name="P37"><text:span text:style-name="T205">Pelota</text:span></text:p>
      <text:p text:style-name="P38"><text:span text:style-name="T206">La pelota tendrá:</text:span></text:p>
      <text:list text:style-name="L39">
        <text:list-item>
          <text:p text:style-name="P39"><text:span text:style-name="T206">referencia al equipo en posesión</text:span></text:p>
        </text:list-item>
        <text:list-item>
          <text:p text:style-name="P39"><text:span text:style-name="T206">índice del jugador que la posee (0..10)</text:span></text:p>
        </text:list-item>
      </text:list>
      <text:p text:style-name="P40"><text:span text:style-name="T207"/></text:p>
      <text:p text:style-name="P40"><text:span text:style-name="T208">Desarrollo del Juego</text:span></text:p>
      <text:p text:style-name="P40"><text:span text:style-name="T209">El objetivo es que la pelota vaya avanzando posiciones en el array hasta llegar a una posición de tiro para meter gol.</text:span></text:p>
      <text:p text:style-name="P40"><text:span text:style-name="T209">El jugador con la pelota se enfrenta al rival en posición inversa:</text:span></text:p>
      <text:list text:style-name="L41">
        <text:list-item>
          <text:p text:style-name="P41"><text:span text:style-name="T209">índice 10 con índice 0 </text:span></text:p>
        </text:list-item>
        <text:list-item>
          <text:p text:style-name="P41"><text:span text:style-name="T209">9 con 1 </text:span></text:p>
        </text:list-item>
        <text:list-item>
          <text:p text:style-name="P41"><text:span text:style-name="T209">8 con 2 </text:span></text:p>
        </text:list-item>
        <text:list-item>
          <text:p text:style-name="P42"><text:span text:style-name="T209">etc.</text:span></text:p>
        </text:list-item>
      </text:list>
      <text:p text:style-name="P43"><text:span text:style-name="T209">Excepto en el caso del tiro, donde el jugador rival siempre será el portero (ver siguiente apartado).</text:span></text:p>
      <text:p text:style-name="P43"><draw:frame text:anchor-type="as-char" svg:width="165.63mm" svg:height="93.40mm" style:rel-width="scale" style:rel-height="scale"><draw:object-ole xlink:href="OleObj1"/><draw:image xlink:href="ObjectReplacements/OleObj1"/></draw:frame><text:span text:style-name="T210"/></text:p>
      <text:p text:style-name="P43"><text:span text:style-name="T211">Acciones posibles</text:span></text:p>
      <text:p text:style-name="P43"><text:span text:style-name="T212">En cada turno, el jugador con la pelota elegirá aleatoriamente una acción válida que puede ser:</text:span></text:p>
      <text:list text:style-name="L44">
        <text:list-item>
          <text:p text:style-name="P44"><text:span text:style-name="T213">Pase</text:span></text:p>
        </text:list-item>
      </text:list>
      <text:p text:style-name="P45"><text:span text:style-name="T214">Se comparan las propiedades:</text:span></text:p>
      <text:list text:style-name="L46">
        <text:list-item>
          <text:p text:style-name="P46"><text:span text:style-name="T215">pase</text:span><text:span text:style-name="T216"><text:s/>del atacante</text:span></text:p>
        </text:list-item>
        <text:list-item>
          <text:p text:style-name="P46"><text:span text:style-name="T217">defensa</text:span><text:span text:style-name="T218"><text:s/>del rival</text:span></text:p>
        </text:list-item>
      </text:list>
      <text:p text:style-name="P47"><text:span text:style-name="T218">Si tiene éxito, el balón pasa al siguiente compañero del array, es decir, la pelota avanza una posición en el array.</text:span></text:p>
      <text:p text:style-name="P47"><text:span text:style-name="T218">Restricción: el jugador con índice 10 (último), no puede realizar pases, solo tiro.</text:span></text:p>
      <text:p text:style-name="P47"><text:span text:style-name="T219"/></text:p>
      <text:list text:style-name="L48">
        <text:list-item>
          <text:p text:style-name="P48"><text:span text:style-name="T220">Regate</text:span></text:p>
        </text:list-item>
      </text:list>
      <text:p text:style-name="P49"><text:span text:style-name="T221">Se compara:</text:span></text:p>
      <text:list text:style-name="L50">
        <text:list-item>
          <text:p text:style-name="P50"><text:span text:style-name="T222">regate</text:span><text:span text:style-name="T223"><text:s/>del atacante</text:span></text:p>
        </text:list-item>
        <text:list-item>
          <text:p text:style-name="P50"><text:span text:style-name="T224">defensa</text:span><text:span text:style-name="T225"><text:s/>del rival</text:span></text:p>
        </text:list-item>
      </text:list>
      <text:p text:style-name="P51"><text:span text:style-name="T225">Si tiene éxito, el jugador avanza una posición (se intercambia con el compañero siguiente en el array) y la pelota avanza una posición, de esta forma continua apuntando al mismo jugador pero que ahora está una posición más adelantada.</text:span></text:p>
      <text:p text:style-name="P51"><text:span text:style-name="T225">Restricción: el jugador con índice 10 (último), no puede realizar regates, solo tiro.</text:span></text:p>
      <text:list text:style-name="L52">
        <text:list-item>
          <text:p text:style-name="P52"><text:span text:style-name="T226">Tiro</text:span></text:p>
        </text:list-item>
      </text:list>
      <text:p text:style-name="P53"><text:span text:style-name="T227">Solo se pueden jugadores cuyo índice en el array sea<text:s/></text:span><text:span text:style-name="T228">≥</text:span><text:span text:style-name="T229"><text:s/>7.</text:span></text:p>
      <text:p text:style-name="P53"><text:span text:style-name="T230">Se compara:</text:span></text:p>
      <text:list text:style-name="L54">
        <text:list-item>
          <text:p text:style-name="P54"><text:span text:style-name="T231">tiro</text:span><text:span text:style-name="T232"><text:s/>ajustado por distancia/índice. Por cada posición alejada del índice 10, el tiro se reduce un 10%. El cálculo sería:</text:span></text:p>
        </text:list-item>
      </text:list>
      <text:p text:style-name="P55"><text:span text:style-name="T232">tiroCalculado = tiroBase * (1 - (10 - índice) * 0.10)</text:span></text:p>
      <text:list text:style-name="L56">
        <text:list-item>
          <text:p text:style-name="P56"><text:span text:style-name="T233">portero</text:span><text:span text:style-name="T234"><text:s/>rival (jugador 0)</text:span></text:p>
        </text:list-item>
      </text:list>
      <text:p text:style-name="P57"><text:span text:style-name="T235"/></text:p>
      <text:p text:style-name="P57"><text:span text:style-name="T235"/></text:p>
      <text:p text:style-name="P57"><text:span text:style-name="T236">Aleatoriedad</text:span></text:p>
      <text:p text:style-name="P57"><text:span text:style-name="T237">Todas las acciones se les aplicará una variación aleatoria entre<text:s/></text:span><text:span text:style-name="T238">-10%</text:span><text:span text:style-name="T239"><text:s/>y<text:s/></text:span><text:span text:style-name="T240">+10%<text:s/></text:span><text:span text:style-name="T241">para que las jugadas no produzcan siempre el mismo resultado.</text:span></text:p>
      <text:p text:style-name="P57"><text:span text:style-name="T242"/></text:p>
      <text:p text:style-name="P57"><text:span text:style-name="T243">Partido</text:span></text:p>
      <text:list text:style-name="L58">
        <text:list-item>
          <text:p text:style-name="P58"><text:span text:style-name="T244">Se generan 2 equipos con 11 jugadores aleatorios cada uno usando la librería<text:s/></text:span><text:span text:style-name="T245">DataFaker</text:span><text:span text:style-name="T246"><text:s/>para generar los nombres y apellidos.</text:span></text:p>
        </text:list-item>
        <text:list-item>
          <text:p text:style-name="P58"><text:span text:style-name="T246">Se sortea el saque inicial para decidir qué equipo tiene la pelota inicialmente.</text:span></text:p>
        </text:list-item>
        <text:list-item>
          <text:p text:style-name="P58"><text:span text:style-name="T246">El partido dura 3 minutos reales. Ayúdate de:</text:span></text:p>
        </text:list-item>
      </text:list>
      <text:p text:style-name="P59"><text:span text:style-name="T246">System.currentTimeMillis()</text:span></text:p>
      <text:p text:style-name="P59"><text:span text:style-name="T246">tomando valores al principio y después en cada acción, para calcular el tiempo total transcurrido.</text:span></text:p>
      <text:list text:style-name="L60">
        <text:list-item>
          <text:p text:style-name="P60"><text:span text:style-name="T246">Entre acciones habrá pausa de 2 segundos para que dé tiempo a seguir el partido:</text:span></text:p>
        </text:list-item>
      </text:list>
      <text:p text:style-name="P61"><text:span text:style-name="T247">Thread</text:span><text:span text:style-name="T248">.</text:span><text:span text:style-name="T249">sleep</text:span><text:span text:style-name="T250">(</text:span><text:span text:style-name="T251">2000</text:span><text:span text:style-name="T252">);</text:span></text:p>
      <text:p text:style-name="P62"><text:span text:style-name="T253"/></text:p>
      <text:p text:style-name="P62"><text:span text:style-name="T254">Narrador</text:span></text:p>
      <text:p text:style-name="P62"><text:span text:style-name="T255">Debe narrar al menos:</text:span></text:p>
      <text:list text:style-name="L63">
        <text:list-item>
          <text:p text:style-name="P63"><text:span text:style-name="T255">pases</text:span></text:p>
        </text:list-item>
        <text:list-item>
          <text:p text:style-name="P63"><text:span text:style-name="T255">regates</text:span></text:p>
        </text:list-item>
        <text:list-item>
          <text:p text:style-name="P63"><text:span text:style-name="T255">robos</text:span></text:p>
        </text:list-item>
        <text:list-item>
          <text:p text:style-name="P63"><text:span text:style-name="T255">tiros</text:span></text:p>
        </text:list-item>
        <text:list-item>
          <text:p text:style-name="P63"><text:span text:style-name="T255">paradas</text:span></text:p>
        </text:list-item>
        <text:list-item>
          <text:p text:style-name="P63"><text:span text:style-name="T255">goles</text:span></text:p>
        </text:list-item>
        <text:list-item>
          <text:p text:style-name="P63"><text:span text:style-name="T255">resultado final</text:span></text:p>
        </text:list-item>
      </text:list>
      <text:p text:style-name="P64"><text:span text:style-name="T255">Por ejemplo algunos mensajes del narrador podrían ser:</text:span></text:p>
      <text:p text:style-name="P64"><text:span text:style-name="T255">“Juan García combina con Asier González”</text:span></text:p>
      <text:p text:style-name="P64"><text:span text:style-name="T255">“Pedro Martínez intenta el pase pero Unai López le adivina la acción y recupera la pelota”</text:span></text:p>
      <text:p text:style-name="P64"><text:span text:style-name="T255">“Diego Moncho dispara y ... Pablo Rivero muy atento atrapa la pelota sin problemas”</text:span></text:p>
      <text:p text:style-name="P64"><text:span text:style-name="T256"/></text:p>
      <text:p text:style-name="P64"><text:span text:style-name="T257">Pasos</text:span></text:p>
      <text:list text:style-name="L65">
        <text:list-item>
          <text:p text:style-name="P65"><text:span text:style-name="T258">Implementar las clases necesarias para definir la lógica y la funcionalidad requerida del simulador.</text:span></text:p>
        </text:list-item>
        <text:list-item>
          <text:p text:style-name="P65"><text:span text:style-name="T258">Documentar con JavaDoc: clases, atributos, constructores, métodos públicos y excepciones.</text:span></text:p>
        </text:list-item>
        <text:list-item>
          <text:p text:style-name="P65"><text:span text:style-name="T258">Generar el JavaDoc final, para ello debes crear una tarea Gradle para configurar la generación de la documentación.</text:span></text:p>
        </text:list-item>
      </text:list>
      <text:p text:style-name="P66"><text:span text:style-name="T258"/></text:p>
      <text:p text:style-name="P66"><text:span text:style-name="T258"/></text:p>
      <text:p text:style-name="P67"><text:span text:style-name="T259">Ejercicio 6. Uso crítico de la IA para la documentación de código</text:span></text:p>
      <text:p text:style-name="P68"><text:span text:style-name="T260">Toma una clase Java creada por ti que tenga al menos 4 atributos y 4 métodos, y utiliza una herramienta de IA para generar una primera versión de la documentación. Después, realiza una revisión crítica siguiendo los siguientes pasos (realizar una captura de pantalla de cada paso):</text:span></text:p>
      <text:list text:style-name="L69">
        <text:list-item>
          <text:p text:style-name="P69"><text:span text:style-name="T260">Copiar el código en una herramienta de IA y solicita una propuesta de documentación JavaDoc.</text:span></text:p>
        </text:list-item>
      </text:list>
      <text:p text:style-name="P70"><draw:frame text:anchor-type="as-char" svg:width="152.40mm" svg:height="221.19mm" style:rel-width="scale" style:rel-height="scale"><draw:object-ole xlink:href="OleObj2"/><draw:image xlink:href="ObjectReplacements/OleObj2"/></draw:frame><text:span text:style-name="T260"/></text:p>
      <text:p text:style-name="P71"><text:span text:style-name="T260"/></text:p>
      <text:list text:style-name="L72">
        <text:list-item>
          <text:p text:style-name="P72"><text:span text:style-name="T260">Comparar el resultado con el código real y detectar errores o problemas como:</text:span></text:p>
        </text:list-item>
        <text:list-item>
          <text:p text:style-name="P72"><text:span text:style-name="T260">descripciones imprecisas,</text:span></text:p>
        </text:list-item>
        <text:list-item>
          <text:p text:style-name="P72"><text:span text:style-name="T260">parámetros mal interpretados,</text:span></text:p>
        </text:list-item>
        <text:list-item>
          <text:p text:style-name="P72"><text:span text:style-name="T260">excepciones inventadas o ausentes,</text:span></text:p>
        </text:list-item>
        <text:list-item>
          <text:p text:style-name="P72"><text:span text:style-name="T260">documentación redundante,</text:span></text:p>
        </text:list-item>
        <text:list-item>
          <text:p text:style-name="P72"><text:span text:style-name="T260">falta de contexto,</text:span></text:p>
        </text:list-item>
        <text:list-item>
          <text:p text:style-name="P72"><text:span text:style-name="T260">uso incorrecto de etiquetas.</text:span></text:p>
        </text:list-item>
        <text:list-item>
          <text:p text:style-name="P72"><text:span text:style-name="T260">Corregir manualmente la documentación.</text:span></text:p>
        </text:list-item>
      </text:list>
      <text:p text:style-name="P73"><draw:frame text:anchor-type="as-char" svg:width="152.40mm" svg:height="182.30mm" style:rel-width="scale" style:rel-height="scale"><draw:object-ole xlink:href="OleObj3"/><draw:image xlink:href="ObjectReplacements/OleObj3"/></draw:frame><text:span text:style-name="T261"/></text:p>
      <text:p text:style-name="P73"><draw:frame text:anchor-type="as-char" svg:width="152.40mm" svg:height="145.52mm" style:rel-width="scale" style:rel-height="scale"><draw:object-ole xlink:href="OleObj4"/><draw:image xlink:href="ObjectReplacements/OleObj4"/></draw:frame><text:span text:style-name="T261"/></text:p>
      <text:p text:style-name="P73"><text:span text:style-name="T261"/></text:p>
      <text:p text:style-name="P74"><text:span text:style-name="T261"/></text:p>
      <text:p text:style-name="P74"><text:span text:style-name="T262">Preguntas de reflexión</text:span></text:p>
      <text:p text:style-name="P74"><text:span text:style-name="T263">¿La IA entendió correctamente el propósito del código?</text:span></text:p>
      <text:p text:style-name="P74"><text:span text:style-name="T264">Si, la ia lo entendio perfectamente</text:span></text:p>
      <text:p text:style-name="P74"><text:span text:style-name="T265">¿La documentación generada era demasiado genérica?</text:span></text:p>
      <text:p text:style-name="P74"><text:span text:style-name="T266">Sí, en algunos métodos solo describe lo mismo que dice el nombre del método y no ayuda mucho</text:span></text:p>
      <text:p text:style-name="P74"><text:span text:style-name="T267">¿Había información incorrecta o inventada?</text:span></text:p>
      <text:p text:style-name="P74"><text:span text:style-name="T268">No, lo hace todo perfecto</text:span></text:p>
      <text:p text:style-name="P74"><text:span text:style-name="T269">¿Qué partes has tenido que corregir?</text:span></text:p>
      <text:p text:style-name="P74"><text:span text:style-name="T270">Tuve que corregir las descripciones de métodos y<text:s text:c="2"/>de variables<text:s text:c="2"/></text:span></text:p>
      <text:p text:style-name="P74"><text:span text:style-name="T271">¿En qué situaciones puede ayudar la IA y en cuáles no conviene confiar sin revisar?</text:span></text:p>
      <text:p text:style-name="P74"><text:span text:style-name="T271">La IA ayuda a hacer una primera versión rápida de la documentación, pero siempre hay que revisarla porque puede interpretar mal el código o inventarse cosas.</text:span></text:p>
      <text:p text:style-name="P75"><text:span text:style-name="T27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